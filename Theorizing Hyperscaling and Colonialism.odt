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 style:master-page-name="Converted1">
      <style:paragraph-properties fo:line-height="100%" style:page-number="auto"/>
    </style:style>
    <style:style style:name="P2" style:family="paragraph" style:parent-style-name="Standard" style:master-page-name="Converted2">
      <style:paragraph-properties fo:line-height="100%" style:page-number="auto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T5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Hyperscaling, AI, and the Autocolonial Churn</text:span></text:p>
      <text:p text:style-name="Standard"/>
      <text:p text:style-name="Standard"/>
      <text:p text:style-name="Standard">Theorizing how trends in the form, function, and political economy of AI allow us to dispossess ourselves of language, art, music, code, <text:s/>and other forms of cultural capital.</text:p>
      <text:p text:style-name="Standard"/>
      <text:p text:style-name="Standard">By 2030, data centers are projected to require $6.7 trillion worldwide to keep pace with demand.<text:span text:style-name="T2"><text:note text:id="ftn1" text:note-class="footnote"><text:note-citation>1</text:note-citation><text:note-body><text:p text:style-name="P1"><text:span text:style-name="T2"/><text:span text:style-name="T3"> </text:span><text:a xlink:type="simple" xlink:href="https://www.mckinsey.com/industries/technology-media-and-telecommunications/our-insights/the-cost-of-compute-a-7-trillion-dollar-race-to-scale-data-centers" text:style-name="Internet_20_link" text:visited-style-name="Visited_20_Internet_20_Link"><text:span text:style-name="T4">https://www.mckinsey.com/industries/technology-media-and-telecommunications/our-insights/the-cost-of-compute-a-7-trillion-dollar-race-to-scale-data-centers</text:span></text:a><text:span text:style-name="T3"> </text:span></text:p></text:note-body></text:note></text:span> Data entry clerks, telemarketers, and administrative assistants have a 90%+ automation risk.</text:p>
      <text:p text:style-name="Standard"/>
      <text:p text:style-name="Standard">Human interaction &amp; communication might be fundamentally altered by the sycophantism of LLMs. #languageisleavingus #narcissistant</text:p>
      <text:p text:style-name="Standard"/>
      <text:p text:style-name="Standard">Why is this bubble different? This is geopolitical. Because it is a cornerstone of geopolitics, this is considered a safe investment. The future of America is the future of AI. Thus these valuations don’t matter because the state has infinite money. (Where else to put one’s money?)</text:p>
      <text:p text:style-name="Standard"/>
      <text:p text:style-name="Standard"/>
      <text:p text:style-name="Standard"/>
      <text:p text:style-name="Standard"/>
      <text:p text:style-name="Standard">Model Collapse.</text:p>
      <text:p text:style-name="Standard"/>
      <text:p text:style-name="Standard">Neural Network Black Boxes. The biologists treating AI like aliens.<text:span text:style-name="T2"><text:note text:id="ftn2" text:note-class="footnote"><text:note-citation>2</text:note-citation><text:note-body><text:p text:style-name="P2"><text:span text:style-name="T2"/><text:span text:style-name="T3"> </text:span><text:a xlink:type="simple" xlink:href="http://removepaywall.com/search?url=https://www.technologyreview.com/2026/01/12/1129782/ai-large-language-models-biology-alien-autopsy/" text:style-name="Internet_20_link" text:visited-style-name="Visited_20_Internet_20_Link"><text:span text:style-name="T5">removepaywall.com/search?url=https://www.technologyreview.com/2026/01/12/1129782/ai-large-language-models-biology-alien-autopsy/</text:span></text:a></text:p></text:note-body></text:note></text:span> </text:p>
      <text:p text:style-name="Standard"/>
      <text:p text:style-name="Standard"><text:a xlink:type="simple" xlink:href="https://thebulletin.org/2026/03/ai-social-platforms-like-moltbook-are-potential-accelerators-of-existential-risk-that-should-be-regulated-as-critical-infrastructure/" text:style-name="ListLabel_20_1" text:visited-style-name="ListLabel_20_1"><text:span text:style-name="T5">https://thebulletin.org/2026/03/ai-social-platforms-like-moltbook-are-potential-accelerators-of-existential-risk-that-should-be-regulated-as-critical-infrastructure/</text:span></text:a></text:p>
      <text:p text:style-name="Standard"/>
      <text:p text:style-name="Standard"><text:a xlink:type="simple" xlink:href="https://www.theideasletter.org/essay/socialism-after-ai/" text:style-name="ListLabel_20_1" text:visited-style-name="ListLabel_20_1"><text:span text:style-name="T5">https://www.theideasletter.org/essay/socialism-after-ai/</text:span></text:a></text:p>
      <text:p text:style-name="Standard"/>
      <text:p text:style-name="Standard"><text:a xlink:type="simple" xlink:href="https://open.substack.com/pub/artificialbureaucracy/p/kill-chain?r=10inn4&amp;utm_medium=ios" text:style-name="ListLabel_20_1" text:visited-style-name="ListLabel_20_1"><text:span text:style-name="T5">https://open.substack.com/pub/artificialbureaucracy/p/kill-chain?r=10inn4&amp;utm_medium=ios</text:span></text:a></text:p>
      <text:p text:style-name="Standard"/>
      <text:p text:style-name="Standard"><text:a xlink:type="simple" xlink:href="https://open.substack.com/pub/jodi7768/p/nvidious-socialism?r=10inn4&amp;utm_medium=ios" text:style-name="ListLabel_20_1" text:visited-style-name="ListLabel_20_1"><text:span text:style-name="T5">https://open.substack.com/pub/jodi7768/p/nvidious-socialism?r=10inn4&amp;utm_medium=ios</text:span></text:a></text:p>
      <text:p text:style-name="Standard"><text:soft-page-break/></text:p>
      <text:p text:style-name="Standard"><text:a xlink:type="simple" xlink:href="https://www.science.org/doi/10.1126/science.aeg1895" text:style-name="ListLabel_20_1" text:visited-style-name="ListLabel_20_1"><text:span text:style-name="T5">https://www.science.org/doi/10.1126/science.aeg1895</text:span></text:a></text:p>
      <text:p text:style-name="Standard"/>
      <text:p text:style-name="Standard"><text:a xlink:type="simple" xlink:href="https://www.science.org/content/article/ai-algorithms-can-become-agents-chaos" text:style-name="ListLabel_20_1" text:visited-style-name="ListLabel_20_1"><text:span text:style-name="T5">https://www.science.org/content/article/ai-algorithms-can-become-agents-chaos</text:span></text:a></text:p>
      <text:p text:style-name="Standard"/>
      <text:p text:style-name="Standard"><text:a xlink:type="simple" xlink:href="https://www.nature.com/articles/s41586-026-10319-8" text:style-name="ListLabel_20_1" text:visited-style-name="ListLabel_20_1"><text:span text:style-name="T5">https://www.nature.com/articles/s41586-026-10319-8</text:span></text:a> “Language models transmit behavioural traits through hidden signals in data” (2026)</text:p>
      <text:p text:style-name="Standard"/>
      <text:p text:style-name="Standard"><text:a xlink:type="simple" xlink:href="https://www.theguardian.com/commentisfree/2026/may/08/ai-datacenters-democracy" text:style-name="ListLabel_20_1" text:visited-style-name="ListLabel_20_1"><text:span text:style-name="T5">https://www.theguardian.com/commentisfree/2026/may/08/ai-datacenters-democracy</text:span></text:a></text:p>
      <text:p text:style-name="Standard">“The fight against AI datacenters isn’t just about tech – it’s about democracy”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Footnote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18" meta:word-count="171" meta:character-count="2002" meta:non-whitespace-character-count="1845"/>
    <meta:generator>LibreOfficeDev/6.0.5.2$Linux_X86_64 LibreOffice_project/</meta:generator>
  </office:meta>
</office:document-meta>
</file>